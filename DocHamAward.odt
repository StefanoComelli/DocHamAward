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50000002CC4DC0487.png" manifest:media-type="image/png"/>
  <manifest:file-entry manifest:full-path="Pictures/1000000000000148000000E18BDB7926.jpg" manifest:media-type="image/jpeg"/>
  <manifest:file-entry manifest:full-path="Pictures/100000000000025C0000025471E8F260.png" manifest:media-type="image/png"/>
  <manifest:file-entry manifest:full-path="Pictures/10000000000003A3000003ED37551AF3.jpg" manifest:media-type="image/jpeg"/>
  <manifest:file-entry manifest:full-path="Pictures/1000000100000209000000B9025B873F.png" manifest:media-type="image/png"/>
  <manifest:file-entry manifest:full-path="Pictures/10000001000001E7000000C2CD3032EE.png" manifest:media-type="image/png"/>
  <manifest:file-entry manifest:full-path="Pictures/10000000000005550000002C83458668.png" manifest:media-type="image/png"/>
  <manifest:file-entry manifest:full-path="Pictures/1000000000000392000000C8C485A521.jpg" manifest:media-type="image/jpeg"/>
  <manifest:file-entry manifest:full-path="Pictures/1000000000000227000000297687D510.png" manifest:media-type="image/png"/>
  <manifest:file-entry manifest:full-path="Pictures/10000000000000B800000141466FB787.jpg" manifest:media-type="image/jpeg"/>
  <manifest:file-entry manifest:full-path="Pictures/100000000000016F0000024906A99339.png" manifest:media-type="image/png"/>
  <manifest:file-entry manifest:full-path="Pictures/100000000000011A000000D757D67D4A.jpg" manifest:media-type="image/jpeg"/>
  <manifest:file-entry manifest:full-path="Pictures/100000010000009300000076B7A48B6B.png" manifest:media-type="image/png"/>
  <manifest:file-entry manifest:full-path="Pictures/100000010000017D000000BD4B9863F6.png" manifest:media-type="image/png"/>
  <manifest:file-entry manifest:full-path="Pictures/1000000100000398000001208F539D25.png" manifest:media-type="image/png"/>
  <manifest:file-entry manifest:full-path="Pictures/100000000000020A0000011FD68F16AF.png" manifest:media-type="image/png"/>
  <manifest:file-entry manifest:full-path="Pictures/10000000000000580000004B668828FF.png" manifest:media-type="image/png"/>
  <manifest:file-entry manifest:full-path="Pictures/10000001000003800000017339EFD879.png" manifest:media-type="image/png"/>
  <manifest:file-entry manifest:full-path="Pictures/10000000000001A4000000AA4E1C159F.png" manifest:media-type="image/png"/>
  <manifest:file-entry manifest:full-path="Pictures/10000000000002210000018FCD95C7AE.png" manifest:media-type="image/png"/>
  <manifest:file-entry manifest:full-path="Pictures/1000000000000141000000DAF9BB36D2.png" manifest:media-type="image/png"/>
  <manifest:file-entry manifest:full-path="Pictures/100000000000025C0000025405EED351.png" manifest:media-type="image/png"/>
  <manifest:file-entry manifest:full-path="Pictures/10000000000001EE0000010F4323B657.png" manifest:media-type="image/png"/>
  <manifest:file-entry manifest:full-path="Pictures/100000000000055200000132A73371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ab51" officeooo:paragraph-rsid="0006a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e040" officeooo:paragraph-rsid="000ce04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6ab51" officeooo:paragraph-rsid="0006ab5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b49e" officeooo:paragraph-rsid="0008b49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ab51" officeooo:paragraph-rsid="0006ab5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ab51" officeooo:paragraph-rsid="0006ab5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8b49e" officeooo:paragraph-rsid="0008b49e"/>
    </style:style>
    <style:style style:name="P8" style:family="paragraph" style:parent-style-name="Standard">
      <style:paragraph-properties fo:text-align="justify" style:justify-single-word="false"/>
      <style:text-properties officeooo:rsid="0008b49e" officeooo:paragraph-rsid="000e0960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b49e" officeooo:paragraph-rsid="000e096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b49e" officeooo:paragraph-rsid="000e0960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08b49e" officeooo:paragraph-rsid="000e0960"/>
    </style:style>
    <style:style style:name="P12" style:family="paragraph" style:parent-style-name="Standard">
      <style:paragraph-properties fo:text-align="center" style:justify-single-word="false"/>
      <style:text-properties officeooo:rsid="0008b49e" officeooo:paragraph-rsid="0008b49e"/>
    </style:style>
    <style:style style:name="P13" style:family="paragraph" style:parent-style-name="Standard">
      <style:paragraph-properties fo:text-align="justify" style:justify-single-word="false"/>
      <style:text-properties officeooo:rsid="00124b45" officeooo:paragraph-rsid="00124b45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124b45" officeooo:paragraph-rsid="00124b45"/>
    </style:style>
    <style:style style:name="P15" style:family="paragraph" style:parent-style-name="Standard">
      <style:paragraph-properties fo:text-align="center" style:justify-single-word="false"/>
      <style:text-properties officeooo:rsid="00124b45" officeooo:paragraph-rsid="00124b45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fo:font-weight="bold" officeooo:rsid="0019d268" officeooo:paragraph-rsid="0019d26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9d268" officeooo:paragraph-rsid="0019d268"/>
    </style:style>
    <style:style style:name="P18" style:family="paragraph" style:parent-style-name="Standard">
      <style:paragraph-properties fo:text-align="center" style:justify-single-word="false"/>
      <style:text-properties officeooo:rsid="0019d268" officeooo:paragraph-rsid="0019d268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d268" officeooo:paragraph-rsid="0019d268" style:font-weight-asian="bold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fo:font-weight="bold" officeooo:rsid="0019d268" officeooo:paragraph-rsid="0019d268" style:font-weight-asian="bold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fo:font-weight="bold" officeooo:rsid="00098e6d" officeooo:paragraph-rsid="00098e6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098e6d" officeooo:paragraph-rsid="00098e6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5883" officeooo:paragraph-rsid="0011588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098e6d" officeooo:paragraph-rsid="00115883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98e6d" officeooo:paragraph-rsid="00115883"/>
    </style:style>
    <style:style style:name="P26" style:family="paragraph" style:parent-style-name="Standard">
      <style:paragraph-properties fo:text-align="center" style:justify-single-word="false"/>
      <style:text-properties officeooo:rsid="00098e6d" officeooo:paragraph-rsid="00098e6d"/>
    </style:style>
    <style:style style:name="P27" style:family="paragraph" style:parent-style-name="Standard">
      <style:paragraph-properties fo:text-align="justify" style:justify-single-word="false"/>
      <style:text-properties officeooo:rsid="0009b106" officeooo:paragraph-rsid="0009b106"/>
    </style:style>
    <style:style style:name="P28" style:family="paragraph" style:parent-style-name="Standard">
      <style:paragraph-properties fo:text-align="justify" style:justify-single-word="false"/>
      <style:text-properties officeooo:rsid="000e0960" officeooo:paragraph-rsid="000e0960"/>
    </style:style>
    <style:style style:name="P29" style:family="paragraph" style:parent-style-name="Standard">
      <style:paragraph-properties fo:text-align="justify" style:justify-single-word="false"/>
      <style:text-properties officeooo:rsid="0010c7df" officeooo:paragraph-rsid="0010c7df"/>
    </style:style>
    <style:style style:name="P30" style:family="paragraph" style:parent-style-name="Standard">
      <style:paragraph-properties fo:text-align="justify" style:justify-single-word="false" fo:break-before="page"/>
      <style:text-properties officeooo:rsid="0010c7df" officeooo:paragraph-rsid="0010c7df"/>
    </style:style>
    <style:style style:name="P31" style:family="paragraph" style:parent-style-name="Standard">
      <style:paragraph-properties fo:text-align="center" style:justify-single-word="false"/>
      <style:text-properties officeooo:rsid="0010c7df" officeooo:paragraph-rsid="0010c7df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b449b" officeooo:paragraph-rsid="000b449b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e0960" officeooo:paragraph-rsid="000b449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0b449b" officeooo:paragraph-rsid="000b449b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09b106" officeooo:paragraph-rsid="0009b106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rsid="0009b106" officeooo:paragraph-rsid="0009b106"/>
    </style:style>
    <style:style style:name="P37" style:family="paragraph" style:parent-style-name="Standard">
      <style:paragraph-properties fo:text-align="justify" style:justify-single-word="false"/>
      <style:text-properties officeooo:rsid="000b449b" officeooo:paragraph-rsid="000b449b"/>
    </style:style>
    <style:style style:name="P38" style:family="paragraph" style:parent-style-name="Standard">
      <style:paragraph-properties fo:text-align="justify" style:justify-single-word="false" fo:break-before="page"/>
      <style:text-properties officeooo:rsid="000b449b" officeooo:paragraph-rsid="000b449b"/>
    </style:style>
    <style:style style:name="P39" style:family="paragraph" style:parent-style-name="Standard">
      <style:paragraph-properties fo:text-align="center" style:justify-single-word="false"/>
      <style:text-properties officeooo:rsid="000b449b" officeooo:paragraph-rsid="000b449b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142521" officeooo:paragraph-rsid="00142521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42521" officeooo:paragraph-rsid="00142521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142521" officeooo:paragraph-rsid="00142521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font-weight="bold" officeooo:rsid="000ce040" officeooo:paragraph-rsid="000ce04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0ce040" officeooo:paragraph-rsid="000ce040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5883" officeooo:paragraph-rsid="0017aff8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0ce040" officeooo:paragraph-rsid="000ce040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ce040" officeooo:paragraph-rsid="000ce040" style:font-weight-asian="normal" style:font-weight-complex="normal"/>
    </style:style>
    <style:style style:name="P48" style:family="paragraph" style:parent-style-name="Standard">
      <style:paragraph-properties fo:text-align="justify" style:justify-single-word="false" fo:break-before="page"/>
      <style:text-properties fo:font-weight="normal" officeooo:rsid="000ce040" officeooo:paragraph-rsid="000ce040" style:font-weight-asian="normal" style:font-weight-complex="normal"/>
    </style:style>
    <style:style style:name="P49" style:family="paragraph" style:parent-style-name="Standard">
      <style:paragraph-properties fo:text-align="justify" style:justify-single-word="false" fo:break-before="page"/>
      <style:text-properties fo:font-weight="bold" officeooo:rsid="000d7a9b" officeooo:paragraph-rsid="000d7a9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0d7a9b" officeooo:paragraph-rsid="000d7a9b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0d7a9b" officeooo:paragraph-rsid="000d7a9b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0d7a9b" officeooo:paragraph-rsid="000d7a9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0d7a9b" officeooo:paragraph-rsid="000d7a9b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0d7a9b" officeooo:paragraph-rsid="000d7a9b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7aff8" officeooo:paragraph-rsid="0017aff8" style:font-weight-asian="normal" style:font-weight-complex="normal"/>
    </style:style>
    <style:style style:name="P56" style:family="paragraph" style:parent-style-name="Standard">
      <style:paragraph-properties fo:text-align="justify" style:justify-single-word="false" fo:break-before="page"/>
      <style:text-properties fo:font-weight="normal" officeooo:rsid="000d7a9b" officeooo:paragraph-rsid="000d7a9b" style:font-weight-asian="normal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fo:font-weight="bold" officeooo:rsid="001aadae" officeooo:paragraph-rsid="001aadae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1aadae" officeooo:paragraph-rsid="001aadae" style:font-weight-asian="bold" style:font-weight-complex="bold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19d268" officeooo:paragraph-rsid="001aadae"/>
    </style:style>
    <style:style style:name="T1" style:family="text">
      <style:text-properties officeooo:rsid="00111e4d"/>
    </style:style>
    <style:style style:name="T2" style:family="text">
      <style:text-properties officeooo:rsid="0019d2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9a67" style:font-weight-asian="bold" style:font-weight-complex="bold"/>
    </style:style>
    <style:style style:name="T6" style:family="text">
      <style:text-properties fo:font-weight="bold" officeooo:rsid="000e0960" style:font-weight-asian="bold" style:font-weight-complex="bold"/>
    </style:style>
    <style:style style:name="T7" style:family="text">
      <style:text-properties officeooo:rsid="000f85d8"/>
    </style:style>
    <style:style style:name="T8" style:family="text">
      <style:text-properties officeooo:rsid="000e0960"/>
    </style:style>
    <style:style style:name="T9" style:family="text">
      <style:text-properties officeooo:rsid="0009b106"/>
    </style:style>
    <style:style style:name="T10" style:family="text">
      <style:text-properties fo:font-weight="normal" officeooo:rsid="000e0960" style:font-weight-asian="normal" style:font-weight-complex="normal"/>
    </style:style>
    <style:style style:name="T11" style:family="text">
      <style:text-properties officeooo:rsid="000d7a9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aff8" style:font-weight-asian="normal" style:font-weight-complex="normal"/>
    </style:style>
    <style:style style:name="T14" style:family="text">
      <style:text-properties fo:font-weight="bold" officeooo:rsid="000d7a9b" style:font-weight-asian="bold" style:font-weight-complex="bold"/>
    </style:style>
    <style:style style:name="T15" style:family="text">
      <style:text-properties officeooo:rsid="0006ab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RUZIONI</text:p>
      <text:p text:style-name="P2">v <text:span text:style-name="T1">2.</text:span><text:span text:style-name="T2">1</text:span><text:span text:style-name="T1">.</text:span>0</text:p>
      <text:p text:style-name="P3"/>
      <text:p text:style-name="P4">La prima volta</text:p>
      <text:p text:style-name="P4"/>
      <text:p text:style-name="P3">Registrarsi presso <text:a xlink:type="simple" xlink:href="https://hamaward.cloud/" text:style-name="Internet_20_link" text:visited-style-name="Visited_20_Internet_20_Link">https://hamaward.cloud/</text:a></text:p>
      <text:p text:style-name="P3"/>
      <text:p text:style-name="P3"><draw:frame draw:style-name="fr1" draw:name="Immagine1" text:anchor-type="as-char" svg:width="17cm" svg:height="0.547cm" draw:z-index="0"><draw:image xlink:href="Pictures/10000000000005550000002CC4DC0487.png" xlink:type="simple" xlink:show="embed" xlink:actuate="onLoad" draw:mime-type="image/png"/></draw:frame></text:p>
      <text:p text:style-name="P3"/>
      <text:p text:style-name="P3"><text:span text:style-name="T3">ATTENZIONE</text:span>: quando viene richiesto un indirizzo email, <text:span text:style-name="T4">indicare esattamente </text:span><text:span text:style-name="T5">la mail pubblica </text:span><text:span text:style-name="T4">che hai in qrz.com</text:span></text:p>
      <text:p text:style-name="P5"/>
      <text:p text:style-name="P6"><draw:frame draw:style-name="fr2" draw:name="Immagine15" text:anchor-type="as-char" svg:width="8.678cm" svg:height="5.953cm" draw:z-index="6"><draw:image xlink:href="Pictures/1000000000000148000000E18BDB7926.jpg" xlink:type="simple" xlink:show="embed" xlink:actuate="onLoad" draw:mime-type="image/jpeg"/></draw:frame></text:p>
      <text:p text:style-name="P6"/>
      <text:p text:style-name="P7">Riceverai una mail per l’attivazione della, login, una volta fatto collegati</text:p>
      <text:p text:style-name="P7"/>
      <text:p text:style-name="P7"><draw:frame draw:style-name="fr1" draw:name="Immagine2" text:anchor-type="as-char" svg:width="17cm" svg:height="0.547cm" draw:z-index="1"><draw:image xlink:href="Pictures/10000000000005550000002C83458668.png" xlink:type="simple" xlink:show="embed" xlink:actuate="onLoad" draw:mime-type="image/png"/></draw:frame></text:p>
      <text:p text:style-name="P7"/>
      <text:p text:style-name="P8">Una volta collegato, solo per la prima volta vai su <text:span text:style-name="T3">HamConnect</text:span></text:p>
      <text:p text:style-name="P9"/>
      <text:p text:style-name="P10"><draw:frame draw:style-name="fr2" draw:name="Immagine16" text:anchor-type="as-char" svg:width="4.868cm" svg:height="8.493cm" draw:z-index="7"><draw:image xlink:href="Pictures/10000000000000B800000141466FB787.jpg" xlink:type="simple" xlink:show="embed" xlink:actuate="onLoad" draw:mime-type="image/jpeg"/></draw:frame></text:p>
      <text:p text:style-name="P8"/>
      <text:p text:style-name="P11">e <text:span text:style-name="T6">scarica la versione di software per il tuo sistema operativo</text:span></text:p>
      <text:p text:style-name="P9"/>
      <text:p text:style-name="P10"><draw:frame draw:style-name="fr3" draw:name="Immagine17" text:anchor-type="char" svg:width="17cm" svg:height="3.718cm" draw:z-index="2"><draw:image xlink:href="Pictures/1000000000000392000000C8C485A521.jpg" xlink:type="simple" xlink:show="embed" xlink:actuate="onLoad" draw:mime-type="image/jpeg"/></draw:frame></text:p>
      <text:p text:style-name="P7">Ti scarica un programma, installalo, <text:span text:style-name="T7">parte da solo.</text:span></text:p>
      <text:p text:style-name="P7"/>
      <text:p text:style-name="P7">Una volta installato prova a cliccare Connect to HamConnect</text:p>
      <text:p text:style-name="P7"/>
      <text:p text:style-name="P12"><draw:frame draw:style-name="fr2" draw:name="Immagine3" text:anchor-type="as-char" svg:width="7.461cm" svg:height="5.689cm" draw:z-index="13"><draw:image xlink:href="Pictures/100000000000011A000000D757D67D4A.jpg" xlink:type="simple" xlink:show="embed" xlink:actuate="onLoad" draw:mime-type="image/jpeg"/></draw:frame></text:p>
      <text:p text:style-name="P7"/>
      <text:p text:style-name="P7">se va tutto bene, dovrebbe diventare così</text:p>
      <text:p text:style-name="P7"/>
      <text:p text:style-name="P12"><draw:frame draw:style-name="fr1" draw:name="Immagine18" text:anchor-type="as-char" svg:width="9.402cm" svg:height="10.149cm" draw:z-index="14"><draw:image xlink:href="Pictures/10000000000003A3000003ED37551AF3.jpg" xlink:type="simple" xlink:show="embed" xlink:actuate="onLoad" draw:mime-type="image/jpeg"/></draw:frame></text:p>
      <text:p text:style-name="P7"/>
      <text:p text:style-name="P13"/>
      <text:p text:style-name="P14">prova a configurare così :</text:p>
      <text:p text:style-name="P13"/>
      <text:p text:style-name="P15"><draw:frame draw:style-name="fr2" draw:name="Immagine20" text:anchor-type="as-char" svg:width="13.787cm" svg:height="4.895cm" draw:z-index="15"><draw:image xlink:href="Pictures/1000000100000209000000B9025B873F.png" xlink:type="simple" xlink:show="embed" xlink:actuate="onLoad" draw:mime-type="image/png"/></draw:frame></text:p>
      <text:p text:style-name="P15"/>
      <text:p text:style-name="P16">ATTENZIONE:</text:p>
      <text:p text:style-name="P17">Cliccando col tasto destro sull’icona di HamConnect <text:s/>nella barra in basso a destra e cliccando poi su Info</text:p>
      <text:p text:style-name="P18"><draw:frame draw:style-name="fr2" draw:name="Immagine14" text:anchor-type="as-char" svg:width="3.889cm" svg:height="3.122cm" draw:z-index="21"><draw:image xlink:href="Pictures/100000010000009300000076B7A48B6B.png" xlink:type="simple" xlink:show="embed" xlink:actuate="onLoad" draw:mime-type="image/png"/></draw:frame></text:p>
      <text:p text:style-name="P17"/>
      <text:p text:style-name="P17">si apre questa finestra</text:p>
      <text:p text:style-name="P18"><draw:frame draw:style-name="fr2" draw:name="Immagine23" text:anchor-type="as-char" svg:width="10.082cm" svg:height="5.001cm" draw:z-index="22"><draw:image xlink:href="Pictures/100000010000017D000000BD4B9863F6.png" xlink:type="simple" xlink:show="embed" xlink:actuate="onLoad" draw:mime-type="image/png"/></draw:frame></text:p>
      <text:p text:style-name="P17"/>
      <text:p text:style-name="P17">dove Autostart vi permette se avere o meno l’avvio automatico all’accensione del PC, ma soprattutto vi fa vedere la versione installata, che deve essere la stessa <text:s/>quella indicata nel sito:</text:p>
      <text:p text:style-name="P18"><draw:frame draw:style-name="fr1" draw:name="Immagine24" text:anchor-type="as-char" svg:width="17cm" svg:height="5.322cm" draw:z-index="23"><draw:image xlink:href="Pictures/1000000100000398000001208F539D25.png" xlink:type="simple" xlink:show="embed" xlink:actuate="onLoad" draw:mime-type="image/png"/></draw:frame></text:p>
      <text:p text:style-name="P17"/>
      <text:p text:style-name="P19"/>
      <text:p text:style-name="P20">IN CASO DI ERRORI</text:p>
      <text:p text:style-name="P17">Se per caso non riuscite ad avviare HamConnect dovete provare a svuotare la cache, qui <text:a xlink:type="simple" xlink:href="https://www.aranzulla.it/come-svuotare-la-cache-del-browser-14614.html" text:style-name="Internet_20_link" text:visited-style-name="Visited_20_Internet_20_Link">https://www.aranzulla.it/come-svuotare-la-cache-del-browser-14614.html</text:a> trovate le indicazioni su come fare.</text:p>
      <text:p text:style-name="P17"/>
      <text:p text:style-name="P17"/>
      <text:p text:style-name="P21">QARTest <text:span text:style-name="T8">per Fonia, CW e RTTY</text:span></text:p>
      <text:p text:style-name="P22"/>
      <text:p text:style-name="P23">Aggiorna all’ultima versione</text:p>
      <text:p text:style-name="P24"/>
      <text:p text:style-name="P25">Consiglio di <text:span text:style-name="T8">configurare</text:span> QARTest in modo di non fare confusione tra il log IQ3WW e il tuo.</text:p>
      <text:p text:style-name="P22"/>
      <text:p text:style-name="P22"><text:span text:style-name="T9">Solo la prima volta, C</text:span>rea un nuovo Log</text:p>
      <text:p text:style-name="P22"/>
      <text:p text:style-name="P26"><draw:frame draw:style-name="fr2" draw:name="Immagine4" text:anchor-type="as-char" svg:width="14.579cm" svg:height="1.085cm" draw:z-index="3"><draw:image xlink:href="Pictures/1000000000000227000000297687D510.png" xlink:type="simple" xlink:show="embed" xlink:actuate="onLoad" draw:mime-type="image/png"/></draw:frame></text:p>
      <text:p text:style-name="P22"/>
      <text:p text:style-name="P22">Definiscilo così</text:p>
      <text:p text:style-name="P22"/>
      <text:p text:style-name="P26"><draw:frame draw:style-name="fr2" draw:name="Immagine5" text:anchor-type="as-char" svg:width="9.71cm" svg:height="15.478cm" draw:z-index="4"><draw:image xlink:href="Pictures/100000000000016F0000024906A99339.png" xlink:type="simple" xlink:show="embed" xlink:actuate="onLoad" draw:mime-type="image/png"/></draw:frame></text:p>
      <text:p text:style-name="P26"/>
      <text:p text:style-name="P27">Le informazioni importanti sono solo quelle evidenziate, configura il resto come tuo solito.</text:p>
      <text:p text:style-name="P28">Se vuoi, puoi scegliere DXPedition con nome di italiani, per avere il nom del corrispondente italiano </text:p>
      <text:p text:style-name="P28"/>
      <text:p text:style-name="P29"/>
      <text:p text:style-name="P30">Seleziona le bande e i modi di tuo interesse</text:p>
      <text:p text:style-name="P29"/>
      <text:p text:style-name="P31"><draw:frame draw:style-name="fr2" draw:name="Immagine19" text:anchor-type="as-char" svg:width="13.811cm" svg:height="7.594cm" draw:z-index="16"><draw:image xlink:href="Pictures/100000000000020A0000011FD68F16AF.png" xlink:type="simple" xlink:show="embed" xlink:actuate="onLoad" draw:mime-type="image/png"/></draw:frame></text:p>
      <text:p text:style-name="P32"/>
      <text:p text:style-name="P32">A regime</text:p>
      <text:p text:style-name="P32"/>
      <text:p text:style-name="P32">Lancia Ham Connect <text:span text:style-name="T10">(nella nuova versione dovrebbe partire in automatico all’avvio del PC)</text:span></text:p>
      <text:p text:style-name="P33"/>
      <text:p text:style-name="P34"><draw:frame draw:style-name="fr2" draw:name="Immagine7" text:anchor-type="as-char" svg:width="2.328cm" svg:height="1.984cm" draw:z-index="17"><draw:image xlink:href="Pictures/10000000000000580000004B668828FF.png" xlink:type="simple" xlink:show="embed" xlink:actuate="onLoad" draw:mime-type="image/png"/></draw:frame></text:p>
      <text:p text:style-name="P32"/>
      <text:p text:style-name="P32">QARTest</text:p>
      <text:p text:style-name="P27">Apri il log di QARtest e vai sulla voce <text:span text:style-name="T3">Broadcast Esterno Dati</text:span> del menù <text:span text:style-name="T3">Opzioni</text:span></text:p>
      <text:p text:style-name="P35"/>
      <text:p text:style-name="P36"><draw:frame draw:style-name="fr2" draw:name="Immagine6" text:anchor-type="as-char" svg:width="11.113cm" svg:height="4.498cm" draw:z-index="5"><draw:image xlink:href="Pictures/10000000000001A4000000AA4E1C159F.png" xlink:type="simple" xlink:show="embed" xlink:actuate="onLoad" draw:mime-type="image/png"/></draw:frame></text:p>
      <text:p text:style-name="P27"/>
      <text:p text:style-name="P37"/>
      <text:p text:style-name="P38">Imposta così</text:p>
      <text:p text:style-name="P37"/>
      <text:p text:style-name="P39"><draw:frame draw:style-name="fr2" draw:name="Immagine8" text:anchor-type="as-char" svg:width="14.42cm" svg:height="10.557cm" draw:z-index="18"><draw:image xlink:href="Pictures/10000000000002210000018FCD95C7AE.png" xlink:type="simple" xlink:show="embed" xlink:actuate="onLoad" draw:mime-type="image/png"/></draw:frame></text:p>
      <text:p text:style-name="P37"/>
      <text:p text:style-name="P37">le volte successive all’apertura del log ti ripresenterà la finestra, controlla che sia a post<text:span text:style-name="T11">o</text:span> e premi <text:span text:style-name="T3">OK</text:span></text:p>
      <text:p text:style-name="P32"/>
      <text:p text:style-name="P40">Per testare,<text:span text:style-name="T12"> prova a loggare un QSO da QARTest, lo dovresti trovare <text:s/>nella fi</text:span><text:span text:style-name="T13">n</text:span><text:span text:style-name="T12">estra del browser</text:span></text:p>
      <text:p text:style-name="P41"/>
      <text:p text:style-name="P42"><draw:frame draw:style-name="fr1" draw:name="Immagine21" text:anchor-type="as-char" svg:width="17cm" svg:height="7.04cm" draw:z-index="19"><draw:image xlink:href="Pictures/10000001000003800000017339EFD879.png" xlink:type="simple" xlink:show="embed" xlink:actuate="onLoad" draw:mime-type="image/png"/></draw:frame></text:p>
      <text:p text:style-name="P41"/>
      <text:p text:style-name="P43">FT8</text:p>
      <text:p text:style-name="P44"/>
      <text:p text:style-name="P45">Aggiorna all’ultima versione</text:p>
      <text:p text:style-name="P45"/>
      <text:p text:style-name="P44">Attento a non sovrascrivere il tuo log, quindi copialo prima di procedere</text:p>
      <text:p text:style-name="P46"/>
      <text:p text:style-name="P46">devi ovviamente cambiare il nominativo mettendo IQ3WW al post del tuo</text:p>
      <text:p text:style-name="P46"/>
      <text:p text:style-name="P46">in WSJT-X è meglio se ti cloni la tua configurazione attuale e modifichi quella</text:p>
      <text:p text:style-name="P46"/>
      <text:p text:style-name="P47"><draw:frame draw:style-name="fr2" draw:name="Immagine9" text:anchor-type="as-char" svg:width="8.493cm" svg:height="5.768cm" draw:z-index="8"><draw:image xlink:href="Pictures/1000000000000141000000DAF9BB36D2.png" xlink:type="simple" xlink:show="embed" xlink:actuate="onLoad" draw:mime-type="image/png"/></draw:frame></text:p>
      <text:p text:style-name="P46"/>
      <text:p text:style-name="P48">Modifica queste impostazioni <text:span text:style-name="T14">Generale</text:span>: <text:span text:style-name="T3">Nominativo</text:span></text:p>
      <text:p text:style-name="P44"/>
      <text:p text:style-name="P47"><draw:frame draw:style-name="fr2" draw:name="Immagine10" text:anchor-type="as-char" svg:width="15.981cm" svg:height="15.769cm" draw:z-index="9"><draw:image xlink:href="Pictures/100000000000025C0000025471E8F260.png" xlink:type="simple" xlink:show="embed" xlink:actuate="onLoad" draw:mime-type="image/png"/></draw:frame></text:p>
      <text:p text:style-name="P46"/>
      <text:p text:style-name="P48"><text:span text:style-name="T3">Segnalazione</text:span>: quelli evidenziati</text:p>
      <text:p text:style-name="P46"/>
      <text:p text:style-name="P47"><draw:frame draw:style-name="fr2" draw:name="Immagine11" text:anchor-type="as-char" svg:width="15.981cm" svg:height="15.769cm" draw:z-index="10"><draw:image xlink:href="Pictures/100000000000025C0000025405EED351.png" xlink:type="simple" xlink:show="embed" xlink:actuate="onLoad" draw:mime-type="image/png"/></draw:frame></text:p>
      <text:p text:style-name="P49">HamConnect</text:p>
      <text:p text:style-name="P50"><text:span text:style-name="T3"/></text:p>
      <text:p text:style-name="P51">andare sul sito <text:a xlink:type="simple" xlink:href="https://hamaward.cloud/" text:style-name="Internet_20_link" text:visited-style-name="Visited_20_Internet_20_Link"><text:span text:style-name="T15">https://hamaward.cloud/</text:span></text:a><text:span text:style-name="T15"> </text:span>e loggarsi</text:p>
      <text:p text:style-name="P51"/>
      <text:p text:style-name="P51">andare su <text:span text:style-name="T3">HamConnect </text:span>e cliccare <text:span text:style-name="T3">Connect to HamConnect</text:span></text:p>
      <text:p text:style-name="P51"/>
      <text:p text:style-name="P52"><draw:frame draw:style-name="fr2" draw:name="Immagine13" text:anchor-type="as-char" svg:width="13.07cm" svg:height="7.17cm" draw:z-index="11"><draw:image xlink:href="Pictures/10000000000001EE0000010F4323B657.png" xlink:type="simple" xlink:show="embed" xlink:actuate="onLoad" draw:mime-type="image/png"/></draw:frame></text:p>
      <text:p text:style-name="P51"/>
      <text:p text:style-name="P51">controllare che ci sia porta 9458<text:span text:style-name="T3">:</text:span></text:p>
      <text:p text:style-name="P53"/>
      <text:p text:style-name="P54"><draw:frame draw:style-name="fr2" draw:name="Immagine22" text:anchor-type="as-char" svg:width="12.887cm" svg:height="5.133cm" draw:z-index="20"><draw:image xlink:href="Pictures/10000001000001E7000000C2CD3032EE.png" xlink:type="simple" xlink:show="embed" xlink:actuate="onLoad" draw:mime-type="image/png"/></draw:frame></text:p>
      <text:p text:style-name="P52"/>
      <text:p text:style-name="P55">Non fare qui Start UDP Broadcast, lo farai dalla finestra del log</text:p>
      <text:p text:style-name="P56">vado su <text:s/><text:span text:style-name="T3">Award List</text:span>, <text:span text:style-name="T3">Award Log</text:span> e clicco <text:span text:style-name="T3">Start UPD</text:span></text:p>
      <text:p text:style-name="P53"/>
      <text:p text:style-name="P51"><draw:frame draw:style-name="fr1" draw:name="Immagine12" text:anchor-type="as-char" svg:width="17cm" svg:height="3.819cm" draw:z-index="12"><draw:image xlink:href="Pictures/100000000000055200000132A7337105.png" xlink:type="simple" xlink:show="embed" xlink:actuate="onLoad" draw:mime-type="image/png"/></draw:frame></text:p>
      <text:p text:style-name="P51"/>
      <text:p text:style-name="P51">così ogni QSO loggato va automaticamente anche sul sito</text:p>
      <text:p text:style-name="P51"/>
      <text:p text:style-name="P57">FAQ</text:p>
      <text:p text:style-name="P58"/>
      <text:list text:style-name="L1">
        <text:list-item>
          <text:p text:style-name="P59">Se per caso non riuscite ad avviare HamConnect dovete provare a svuotare la cache, qui <text:a xlink:type="simple" xlink:href="https://www.aranzulla.it/come-svuotare-la-cache-del-browser-14614.html" text:style-name="Internet_20_link" text:visited-style-name="Visited_20_Internet_20_Link">https://www.aranzulla.it/come-svuotare-la-cache-del-browser-14614.html</text:a> trovate le indicazioni su come f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5T12:57:50.929000000</meta:creation-date>
    <dc:date>2026-05-30T21:58:39.864602800</dc:date>
    <meta:editing-duration>PT1H23M48S</meta:editing-duration>
    <meta:editing-cycles>22</meta:editing-cycles>
    <meta:generator>LibreOffice/26.2.1.2$Windows_X86_64 LibreOffice_project/620$Build-2</meta:generator>
    <meta:print-date>2026-05-30T21:57:55.241047100</meta:print-date>
    <meta:printed-by>File PDF</meta:printed-by>
    <meta:document-statistic meta:table-count="0" meta:image-count="24" meta:object-count="0" meta:page-count="13" meta:paragraph-count="72" meta:word-count="462" meta:character-count="2971" meta:non-whitespace-character-count="2554"/>
  </office:meta>
</office:document-meta>
</file>